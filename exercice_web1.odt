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20b1" officeooo:paragraph-rsid="000f20b1" style:font-weight-asian="bold" style:font-weight-complex="bold"/>
    </style:style>
    <style:style style:name="P2" style:family="paragraph" style:parent-style-name="Standard" style:list-style-name="L1">
      <style:text-properties officeooo:rsid="000df654" officeooo:paragraph-rsid="000df654"/>
    </style:style>
    <style:style style:name="P3" style:family="paragraph" style:parent-style-name="Standard">
      <style:text-properties officeooo:rsid="000df654" officeooo:paragraph-rsid="000e13e5"/>
    </style:style>
    <style:style style:name="P4" style:family="paragraph" style:parent-style-name="Standard" style:list-style-name="L1">
      <style:text-properties officeooo:rsid="000e13e5" officeooo:paragraph-rsid="000e13e5"/>
    </style:style>
    <style:style style:name="P5" style:family="paragraph" style:parent-style-name="Standard" style:list-style-name="L1">
      <style:text-properties fo:color="#000000" loext:opacity="100%" officeooo:rsid="000f20b1" officeooo:paragraph-rsid="000f20b1"/>
    </style:style>
    <style:style style:name="P6" style:family="paragraph" style:parent-style-name="Standard">
      <style:text-properties fo:color="#000000" loext:opacity="100%" officeooo:rsid="000f20b1" officeooo:paragraph-rsid="000f20b1"/>
    </style:style>
    <style:style style:name="P7" style:family="paragraph" style:parent-style-name="Standard">
      <style:text-properties officeooo:rsid="000df654" officeooo:paragraph-rsid="000df6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13e5"/>
    </style:style>
    <style:style style:name="T3" style:family="text">
      <style:text-properties fo:color="#ff0000" loext:opacity="100%"/>
    </style:style>
    <style:style style:name="T4" style:family="text">
      <style:text-properties officeooo:rsid="000f20b1"/>
    </style:style>
    <style:style style:name="T5" style:family="text">
      <style:text-properties fo:color="#00a933" loext:opacity="100%" officeooo:rsid="000f20b1"/>
    </style:style>
    <style:style style:name="T6" style:family="text">
      <style:text-properties fo:color="#000000" loext:opacity="100%" officeooo:rsid="000f20b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de groupe WEB1</text:p>
      <text:p text:style-name="P1"/>
      <text:p text:style-name="P1"/>
      <text:list text:style-name="L1">
        <text:list-item>
          <text:p text:style-name="P2">Pour le dark mode, il sera simple avec juste un changement de couleur du body de white en dark et vis versa</text:p>
        </text:list-item>
        <text:list-item>
          <text:p text:style-name="P2">Concerant les cartes, on aura une animation en hover quand on passe avec la souris, puis quand on clique sur une carte, il y’aura une animation en top =&gt; <text:span text:style-name="T1">-20px</text:span> puis un retour automatique de <text:span text:style-name="T1">0px</text:span></text:p>
        </text:list-item>
        <text:list-item>
          <text:p text:style-name="P2">Pour la partie controles, chaque bouton a un controle sur les forme ci-dessous avec comme </text:p>
        </text:list-item>
      </text:list>
      <text:p text:style-name="P3"><text:s text:c="6"/>animation: le déplacement en left→ top → <text:span text:style-name="T2">left→ top pour la première forme</text:span></text:p>
      <text:p text:style-name="P3"><text:s text:c="12"/>- <text:span text:style-name="T2">La forme suivante aura comme animation le changement de carré en une forme arrondit</text:span></text:p>
      <text:p text:style-name="P3"><text:s text:c="12"/>- <text:span text:style-name="T2">la forme suivant , un déplacement classique vers la droite puis le dernier fait une rotation à 360°</text:span></text:p>
      <text:list text:continue-numbering="true" text:style-name="L1">
        <text:list-item>
          <text:p text:style-name="P4">sur cette partie quand on clique sur le bouton <text:span text:style-name="T3">Afficher notification </text:span>ça affiche l’animation en bas avec une animation puis <text:span text:style-name="T4">disparaît au bout de </text:span><text:span text:style-name="T5">2s</text:span><text:span text:style-name="T6">.</text:span></text:p>
        </text:list-item>
        <text:list-item>
          <text:p text:style-name="P5">Pour cette partie, on aura un champs et deux bouton, le bouton <text:span text:style-name="T3">Disable</text:span> désactive le champ et <text:span text:style-name="T3">Enable</text:span> le réactive</text:p>
        </text:list-item>
      </text:list>
      <text:p text:style-name="P6"/>
      <text:p text:style-name="P6"/>
      <text:p text:style-name="P6">Bonne chance.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1T11:32:29.339075607</meta:creation-date>
    <dc:date>2026-05-11T13:38:47.523391466</dc:date>
    <meta:editing-duration>PT11M</meta:editing-duration>
    <meta:editing-cycles>1</meta:editing-cycles>
    <meta:document-statistic meta:table-count="0" meta:image-count="0" meta:object-count="0" meta:page-count="1" meta:paragraph-count="10" meta:word-count="176" meta:character-count="983" meta:non-whitespace-character-count="791"/>
    <meta:generator>LibreOffice/26.2.1.2$Linux_X86_64 LibreOffice_project/620$Build-2</meta:generator>
  </office:meta>
</office:document-meta>
</file>